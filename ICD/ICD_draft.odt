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36" officeooo:paragraph-rsid="000ddd36"/>
    </style:style>
    <style:style style:name="P2" style:family="paragraph" style:parent-style-name="Standard">
      <style:text-properties style:text-underline-style="solid" style:text-underline-width="auto" style:text-underline-color="font-color" officeooo:rsid="000f27e8" officeooo:paragraph-rsid="000f27e8"/>
    </style:style>
    <style:style style:name="P3" style:family="paragraph" style:parent-style-name="Standard">
      <style:text-properties style:text-underline-style="none" officeooo:rsid="000f27e8" officeooo:paragraph-rsid="000f27e8"/>
    </style:style>
    <style:style style:name="P4" style:family="paragraph" style:parent-style-name="Standard">
      <style:text-properties fo:language="en" fo:country="US" style:text-underline-style="none" officeooo:rsid="000f27e8" officeooo:paragraph-rsid="000f27e8" style:script-type="latin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officeooo:rsid="000f27e8" officeooo:paragraph-rsid="000f27e8" style:script-type="latin"/>
    </style:style>
    <style:style style:name="P6" style:family="paragraph" style:parent-style-name="Standard" style:list-style-name="L1">
      <style:text-properties fo:language="en" fo:country="US" style:text-underline-style="none" officeooo:rsid="000f27e8" officeooo:paragraph-rsid="000f27e8" style:script-type="latin"/>
    </style:style>
    <style:style style:name="P7" style:family="paragraph" style:parent-style-name="Standard" style:list-style-name="L2">
      <style:text-properties fo:language="en" fo:country="US" style:text-underline-style="none" officeooo:rsid="000f27e8" officeooo:paragraph-rsid="000f27e8" style:script-type="latin"/>
    </style:style>
    <style:style style:name="T1" style:family="text">
      <style:text-properties fo:language="en" fo:country="US" style:script-type="latin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CD OpenILA</text:p>
      <text:p text:style-name="P1"/>
      <text:p text:style-name="P2">Abstract</text:p>
      <text:p text:style-name="P3"/>
      <text:p text:style-name="P3">This is the ICD <text:span text:style-name="T1">(interconnection Document) of the OpenILA.</text:span></text:p>
      <text:p text:style-name="P4"/>
      <text:p text:style-name="P4"/>
      <text:p text:style-name="P5">Commands</text:p>
      <text:p text:style-name="P4"/>
      <text:p text:style-name="P4">This ICD has the following commands from the SW to FPGA:</text:p>
      <text:list text:style-name="L1">
        <text:list-item>
          <text:p text:style-name="P6">Launch the trigger of the ILA</text:p>
        </text:list-item>
        <text:list-item>
          <text:p text:style-name="P6">Stop the trigger of the ILA</text:p>
        </text:list-item>
        <text:list-item>
          <text:p text:style-name="P6">Launch the instantaneous ILA</text:p>
        </text:list-item>
      </text:list>
      <text:p text:style-name="P4"/>
      <text:p text:style-name="P4">From the FPGA to SW are the following commands:</text:p>
      <text:list text:style-name="L2">
        <text:list-item>
          <text:p text:style-name="P7">ILA available</text:p>
        </text:list-item>
        <text:list-item>
          <text:p text:style-name="P7">Active trigger</text:p>
        </text:list-item>
        <text:list-item>
          <text:p text:style-name="P7">Finish IL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3T20:24:41.098426792</meta:creation-date>
    <dc:date>2026-06-23T20:29:51.712767074</dc:date>
    <meta:editing-duration>PT5M11S</meta:editing-duration>
    <meta:editing-cycles>2</meta:editing-cycles>
    <meta:generator>LibreOffice/26.2.2.2$Linux_X86_64 LibreOffice_project/620$Build-2</meta:generator>
    <meta:document-statistic meta:table-count="0" meta:image-count="0" meta:object-count="0" meta:page-count="1" meta:paragraph-count="12" meta:word-count="61" meta:character-count="315" meta:non-whitespace-character-count="272"/>
  </office:meta>
</office:document-meta>
</file>